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7285in" style:rel-column-width="1050*"/>
    </style:style>
    <style:style style:name="Table1.B" style:family="table-column">
      <style:table-column-properties style:column-width="2.6799in" style:rel-column-width="3862*"/>
    </style:style>
    <style:style style:name="Table1.C" style:family="table-column">
      <style:table-column-properties style:column-width="0.6347in" style:rel-column-width="915*"/>
    </style:style>
    <style:style style:name="Table1.D" style:family="table-column">
      <style:table-column-properties style:column-width="2.6493in" style:rel-column-width="3818*"/>
    </style:style>
    <style:style style:name="Table1.1" style:family="table-row">
      <style:table-row-properties style:min-row-height="0.4792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.10" style:family="table-row">
      <style:table-row-properties style:min-row-height="0.2375in"/>
    </style:style>
    <style:style style:name="P1" style:family="paragraph" style:parent-style-name="Standard">
      <style:text-properties officeooo:rsid="0018b95b" officeooo:paragraph-rsid="0018b95b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a994a" officeooo:paragraph-rsid="001a994a" style:font-size-asian="14pt" style:font-weight-asian="bold" style:font-size-complex="14pt" style:font-weight-complex="bold"/>
    </style:style>
    <style:style style:name="P3" style:family="paragraph" style:parent-style-name="Table_20_Contents">
      <style:text-properties officeooo:rsid="001a994a" officeooo:paragraph-rsid="001a994a"/>
    </style:style>
    <style:style style:name="P4" style:family="paragraph" style:parent-style-name="Table_20_Contents">
      <style:text-properties fo:font-size="14pt" fo:font-weight="bold" officeooo:rsid="001a994a" officeooo:paragraph-rsid="001a994a" style:font-size-asian="14pt" style:font-weight-asian="bold" style:font-size-complex="14pt" style:font-weight-complex="bold"/>
    </style:style>
    <style:style style:name="P5" style:family="paragraph" style:parent-style-name="Table_20_Contents">
      <style:text-properties officeooo:rsid="001b887f" officeooo:paragraph-rsid="001b887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8pt" fo:font-weight="bold" fo:background-color="#ffff6d" style:font-size-asian="18pt" style:font-weight-asian="bold" style:font-size-complex="18pt" style:font-weight-complex="bold"/>
    </style:style>
    <style:style style:name="T1" style:family="text">
      <style:text-properties officeooo:rsid="001b887f"/>
    </style:style>
    <style:style style:name="T2" style:family="text">
      <style:text-properties fo:font-size="18pt" fo:font-weight="bold" fo:background-color="#ffff6d" style:font-size-asian="18pt" style:font-weight-asian="bold" style:font-size-complex="18pt" style:font-weight-complex="bold"/>
    </style:style>
    <style:style style:name="gr1" style:family="graphic">
      <style:graphic-properties draw:stroke="none" svg:stroke-color="#000000" draw:fill="none" draw:fill-color="#ffffff" fo:min-height="0.3437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1" draw:text-style-name="P7" svg:width="6.2295in" svg:height="0.3441in" svg:x="0.1902in" svg:y="0.0339in"><draw:text-box><text:p text:style-name="P6"><text:span text:style-name="T2">PRETRAINED MODELS ON ORGANIC MOLECULES</text:span></text:p></draw:text-box></draw:frame></text:p>
      <text:p text:style-name="P1"/>
      <text:p text:style-name="P1"/>
      <text:p text:style-name="P1"/>
      <text:p text:style-name="P2"><text:tab/><text:span text:style-name="T1">UNIQUE</text:span> MODELS USED IN PAPERS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SR NO.</text:p>
          </table:table-cell>
          <table:table-cell table:style-name="Table1.A1" office:value-type="string">
            <text:p text:style-name="P4">MODEL NAME</text:p>
          </table:table-cell>
          <table:table-cell table:style-name="Table1.A1" office:value-type="string">
            <text:p text:style-name="Table_20_Contents"/>
          </table:table-cell>
          <table:table-cell table:style-name="Table1.D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Table_20_Contents">CHGNet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Table_20_Contents">MACE-MP-0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Table_20_Contents">GRACE-2L-MPtrj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Table_20_Contents">MACE-MPA-0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Table_20_Contents">Orb-v2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Table_20_Contents">eSEN-30M-OAM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Table_20_Contents">orb-v3-conservative-inf-mpa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Table_20_Contents">MACE-MH-1-OMAT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0">
          <table:table-cell table:style-name="Table1.A2" office:value-type="string">
            <text:p text:style-name="P5">9</text:p>
          </table:table-cell>
          <table:table-cell table:style-name="Table1.A2" office:value-type="string">
            <text:p text:style-name="Table_20_Contents">UMA-M-P2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UMA-s-1.1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UMA-m-1.1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Orb-v3-omo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ACELES-OFF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ACE-OMOL-0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ACE-OFF24(M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ACE-OFF23(S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ACE-OFF23(L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ACE-MH-1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FeNNix-Bio1(S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FeNNix-Bio1(M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Egret-1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AIMNet2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AceFF-2.0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AceFF-1.1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13T15:41:35.775426110</meta:creation-date>
    <dc:date>2026-07-14T16:16:27.924388970</dc:date>
    <meta:editing-duration>PT1H15M38S</meta:editing-duration>
    <meta:editing-cycles>2</meta:editing-cycles>
    <meta:generator>LibreOffice/24.2.7.2$Linux_X86_64 LibreOffice_project/420$Build-2</meta:generator>
    <meta:document-statistic meta:table-count="1" meta:image-count="0" meta:object-count="0" meta:page-count="2" meta:paragraph-count="36" meta:word-count="42" meta:character-count="319" meta:non-whitespace-character-count="312"/>
  </office:meta>
</office:document-meta>
</file>