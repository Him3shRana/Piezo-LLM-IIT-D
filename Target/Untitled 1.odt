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785bf" officeooo:paragraph-rsid="001785bf"/>
    </style:style>
    <style:style style:name="P2" style:family="paragraph" style:parent-style-name="Heading_20_2">
      <style:text-properties officeooo:paragraph-rsid="0019d21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paragraph-rsid="0019d21b"/>
    </style:style>
    <style:style style:name="P10" style:family="paragraph" style:parent-style-name="Text_20_body" style:list-style-name="L3">
      <style:text-properties officeooo:paragraph-rsid="0019d21b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>
      <style:text-properties officeooo:paragraph-rsid="0019d21b"/>
    </style:style>
    <style:style style:name="T1" style:family="text">
      <style:text-properties officeooo:rsid="0017723f"/>
    </style:style>
    <style:style style:name="T2" style:family="text">
      <style:text-properties officeooo:rsid="00186d6f"/>
    </style:style>
    <style:style style:name="T3" style:family="text">
      <style:text-properties officeooo:rsid="001d26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ster Classification of Piezoelectric Molecular Crystals</text:h>
      <text:h text:style-name="Heading_20_2" text:outline-level="2">1. Amino Acid Crystals</text:h>
      <text:p text:style-name="Text_20_body">This is probably the largest and easiest family to start with.</text:p>
      <text:p text:style-name="Text_20_body">Examples:</text:p>
      <text:list text:style-name="L1">
        <text:list-item>
          <text:p text:style-name="P4">α-Glycine <text:s text:c="2"/><text:span text:style-name="T1">DONE</text:span></text:p>
        </text:list-item>
        <text:list-item>
          <text:p text:style-name="P4">β-Glycine <text:s text:c="2"/><text:span text:style-name="T1">DONE</text:span></text:p>
        </text:list-item>
        <text:list-item>
          <text:p text:style-name="P4">γ-Glycine <text:s text:c="2"/><text:span text:style-name="T1">DONE</text:span></text:p>
        </text:list-item>
        <text:list-item>
          <text:p text:style-name="P4">L-Alanine --- <text:span text:style-name="T3">DONE</text:span></text:p>
        </text:list-item>
        <text:list-item>
          <text:p text:style-name="P4">L-Valine --</text:p>
        </text:list-item>
        <text:list-item>
          <text:p text:style-name="P4">L-Leucine --</text:p>
        </text:list-item>
        <text:list-item>
          <text:p text:style-name="P4">L-Isoleucine-- </text:p>
        </text:list-item>
        <text:list-item>
          <text:p text:style-name="P4">L-Histidine --</text:p>
        </text:list-item>
        <text:list-item>
          <text:p text:style-name="P4">L-Arginine --</text:p>
        </text:list-item>
        <text:list-item>
          <text:p text:style-name="P4">L-Lysine --</text:p>
        </text:list-item>
        <text:list-item>
          <text:p text:style-name="P4">L-Threonine -- </text:p>
        </text:list-item>
        <text:list-item>
          <text:p text:style-name="P4">L-Serine --</text:p>
        </text:list-item>
        <text:list-item>
          <text:p text:style-name="P4">L-Proline -- </text:p>
        </text:list-item>
        <text:list-item>
          <text:p text:style-name="P3">Hydroxy-L-Proline --</text:p>
        </text:list-item>
      </text:list>
      <text:p text:style-name="Text_20_body">Seventeen amino acids and their compounds have experimentally demonstrated piezoelectricity. </text:p>
      <text:p text:style-name="Horizontal_20_Line"/>
      <text:h text:style-name="Heading_20_2" text:outline-level="2"/>
      <text:p text:style-name="Horizontal_20_Line"/>
      <text:h text:style-name="P1" text:outline-level="2">wait</text:h>
      <text:h text:style-name="P2" text:outline-level="2">3. Dipeptide Crystals</text:h>
      <text:p text:style-name="P33">Examples:</text:p>
      <text:list text:style-name="L3">
        <text:list-item>
          <text:p text:style-name="P9">Diphenylalanine <text:span text:style-name="T2">DONE</text:span></text:p>
        </text:list-item>
        <text:list-item>
          <text:p text:style-name="P9">Cyclo-Gly-Phe </text:p>
        </text:list-item>
        <text:list-item>
          <text:p text:style-name="P10">Cyclo-Phe-Phe </text:p>
        </text:list-item>
      </text:list>
      <text:p text:style-name="P33">These became very popular after 2010. </text:p>
      <text:p text:style-name="Horizontal_20_Line"/>
      <text:h text:style-name="P1" text:outline-level="2"><text:soft-page-break/>Wait</text:h>
      <text:h text:style-name="Heading_20_2" text:outline-level="2">4. Tripeptide and Oligopeptide Crystals</text:h>
      <text:p text:style-name="Text_20_body">Examples:</text:p>
      <text:list text:style-name="L4">
        <text:list-item>
          <text:p text:style-name="P12">Gly-Phe-Gly </text:p>
        </text:list-item>
        <text:list-item>
          <text:p text:style-name="P12">Phe-Phe-Gly </text:p>
        </text:list-item>
        <text:list-item>
          <text:p text:style-name="P12">Ala-Gly-Gly </text:p>
        </text:list-item>
        <text:list-item>
          <text:p text:style-name="P11">Short self-assembled peptides </text:p>
        </text:list-item>
      </text:list>
      <text:p text:style-name="Text_20_body">Important for bio-piezoelectricity research. </text:p>
      <text:p text:style-name="Horizontal_20_Line"/>
      <text:h text:style-name="Heading_20_2" text:outline-level="2">5. Organic Ferroelectric Molecular Crystals</text:h>
      <text:p text:style-name="Text_20_body">These are among the highest-performing molecular piezoelectrics.</text:p>
      <text:p text:style-name="Text_20_body">Examples:</text:p>
      <text:list text:style-name="L5">
        <text:list-item>
          <text:p text:style-name="P14">Croconic Acid </text:p>
        </text:list-item>
        <text:list-item>
          <text:p text:style-name="P14">Diisopropylammonium Bromide </text:p>
        </text:list-item>
        <text:list-item>
          <text:p text:style-name="P14">Diisopropylammonium Chloride </text:p>
        </text:list-item>
        <text:list-item>
          <text:p text:style-name="P13">Diisopropylammonium Iodide </text:p>
        </text:list-item>
      </text:list>
      <text:p text:style-name="Text_20_body">These are core materials in molecular ferroelectric research. </text:p>
      <text:p text:style-name="Horizontal_20_Line"/>
      <text:h text:style-name="Heading_20_2" text:outline-level="2">6. Hydrogen-Bonded Organic Ferroelectrics</text:h>
      <text:p text:style-name="Text_20_body">Examples:</text:p>
      <text:list text:style-name="L6">
        <text:list-item>
          <text:p text:style-name="P16">Croconic Acid </text:p>
        </text:list-item>
        <text:list-item>
          <text:p text:style-name="P16">CBDC </text:p>
        </text:list-item>
        <text:list-item>
          <text:p text:style-name="P15">PhMDA </text:p>
        </text:list-item>
      </text:list>
      <text:p text:style-name="Text_20_body">These exhibit polarization through proton transfer. </text:p>
      <text:p text:style-name="Horizontal_20_Line"/>
      <text:h text:style-name="Heading_20_2" text:outline-level="2">7. Charge-Transfer Molecular Crystals</text:h>
      <text:p text:style-name="Text_20_body">Examples:</text:p>
      <text:list text:style-name="L7">
        <text:list-item>
          <text:p text:style-name="P18">TTF-CA </text:p>
        </text:list-item>
        <text:list-item>
          <text:p text:style-name="P18">TTF derivatives </text:p>
        </text:list-item>
        <text:list-item>
          <text:p text:style-name="P17">Chloranil complexes </text:p>
        </text:list-item>
      </text:list>
      <text:p text:style-name="Text_20_body">Useful for ferroelectric and multiferroic studies. </text:p>
      <text:p text:style-name="Horizontal_20_Line"/>
      <text:h text:style-name="Heading_20_2" text:outline-level="2"><text:soft-page-break/>8. Supramolecular Ferroelectric Crystals</text:h>
      <text:p text:style-name="Text_20_body">Examples:</text:p>
      <text:list text:style-name="L8">
        <text:list-item>
          <text:p text:style-name="P20">Hydrogen-bonded assemblies </text:p>
        </text:list-item>
        <text:list-item>
          <text:p text:style-name="P20">Urea-based assemblies </text:p>
        </text:list-item>
        <text:list-item>
          <text:p text:style-name="P20">Amide-based assemblies </text:p>
        </text:list-item>
        <text:list-item>
          <text:p text:style-name="P19">Host-guest molecular crystals </text:p>
        </text:list-item>
      </text:list>
      <text:p text:style-name="Text_20_body">A large emerging field. </text:p>
      <text:p text:style-name="Horizontal_20_Line"/>
      <text:h text:style-name="Heading_20_2" text:outline-level="2">9. Molecular Perovskite Ferroelectrics</text:h>
      <text:p text:style-name="Text_20_body">Examples:</text:p>
      <text:list text:style-name="L9">
        <text:list-item>
          <text:p text:style-name="P22">TMCM-CdCl3 </text:p>
        </text:list-item>
        <text:list-item>
          <text:p text:style-name="P22">TMCM-MnCl3 </text:p>
        </text:list-item>
        <text:list-item>
          <text:p text:style-name="P22">Metal-free perovskites </text:p>
        </text:list-item>
        <text:list-item>
          <text:p text:style-name="P21">Hybrid organic-inorganic perovskites </text:p>
        </text:list-item>
      </text:list>
      <text:p text:style-name="Text_20_body">Very active area after 2018. </text:p>
      <text:p text:style-name="Horizontal_20_Line"/>
      <text:h text:style-name="Heading_20_2" text:outline-level="2">10. Pharmaceutical Molecular Crystals</text:h>
      <text:p text:style-name="Text_20_body">Examples:</text:p>
      <text:list text:style-name="L10">
        <text:list-item>
          <text:p text:style-name="P24">Paracetamol Form II </text:p>
        </text:list-item>
        <text:list-item>
          <text:p text:style-name="P24">Aspirin polymorphs </text:p>
        </text:list-item>
        <text:list-item>
          <text:p text:style-name="P23">Acetaminophen polymorphs </text:p>
        </text:list-item>
      </text:list>
      <text:p text:style-name="Text_20_body">Many have non-centrosymmetric phases.</text:p>
      <text:p text:style-name="Horizontal_20_Line"/>
      <text:h text:style-name="Heading_20_2" text:outline-level="2">11. Nucleobase Crystals</text:h>
      <text:p text:style-name="Text_20_body">Examples:</text:p>
      <text:list text:style-name="L11">
        <text:list-item>
          <text:p text:style-name="P26">Adenine </text:p>
        </text:list-item>
        <text:list-item>
          <text:p text:style-name="P26">Guanine </text:p>
        </text:list-item>
        <text:list-item>
          <text:p text:style-name="P26">Cytosine </text:p>
        </text:list-item>
        <text:list-item>
          <text:p text:style-name="P26">Uracil </text:p>
        </text:list-item>
        <text:list-item>
          <text:p text:style-name="P25">Thymine </text:p>
        </text:list-item>
      </text:list>
      <text:p text:style-name="Text_20_body">Often studied as bio-piezoelectrics.</text:p>
      <text:p text:style-name="Horizontal_20_Line"/>
      <text:h text:style-name="Heading_20_2" text:outline-level="2"><text:soft-page-break/>12. Sugar and Carbohydrate Crystals</text:h>
      <text:p text:style-name="Text_20_body">Examples:</text:p>
      <text:list text:style-name="L12">
        <text:list-item>
          <text:p text:style-name="P28">Sucrose </text:p>
        </text:list-item>
        <text:list-item>
          <text:p text:style-name="P28">Glucose </text:p>
        </text:list-item>
        <text:list-item>
          <text:p text:style-name="P28">Lactose </text:p>
        </text:list-item>
        <text:list-item>
          <text:p text:style-name="P27">Mannitol </text:p>
        </text:list-item>
      </text:list>
      <text:p text:style-name="Text_20_body">Historically important piezoelectric biomaterials.</text:p>
      <text:p text:style-name="Horizontal_20_Line"/>
      <text:h text:style-name="Heading_20_2" text:outline-level="2">13. Biomacromolecular Crystals</text:h>
      <text:p text:style-name="Text_20_body">Examples:</text:p>
      <text:list text:style-name="L13">
        <text:list-item>
          <text:p text:style-name="P30">Collagen </text:p>
        </text:list-item>
        <text:list-item>
          <text:p text:style-name="P30">Silk fibroin </text:p>
        </text:list-item>
        <text:list-item>
          <text:p text:style-name="P30">Cellulose nanocrystals </text:p>
        </text:list-item>
        <text:list-item>
          <text:p text:style-name="P29">Chitin crystals </text:p>
        </text:list-item>
      </text:list>
      <text:p text:style-name="Text_20_body">Important for biomedical energy harvesters. </text:p>
      <text:p text:style-name="Horizontal_20_Line"/>
      <text:h text:style-name="Heading_20_2" text:outline-level="2">14. Nonlinear Optical (NLO) Molecular Crystals</text:h>
      <text:p text:style-name="Text_20_body">Search all papers containing:</text:p>
      <text:list text:style-name="L14">
        <text:list-item>
          <text:p text:style-name="P32">SHG </text:p>
        </text:list-item>
        <text:list-item>
          <text:p text:style-name="P32">Non-centrosymmetric crystal </text:p>
        </text:list-item>
        <text:list-item>
          <text:p text:style-name="P32">NLO crystal </text:p>
        </text:list-item>
        <text:list-item>
          <text:p text:style-name="P31">Kurtz–Perry </text:p>
        </text:list-item>
      </text:list>
      <text:p text:style-name="Text_20_body">Most NLO molecular crystals are automatically candidates for piezoelectricity because piezoelectricity and second-order nonlinear optics require non-centrosymmetric symmetry.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22:03:10.597362743</meta:creation-date>
    <dc:date>2026-06-26T04:34:19.114385345</dc:date>
    <meta:editing-duration>PT1H31M2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03" meta:word-count="340" meta:character-count="2494" meta:non-whitespace-character-count="2254"/>
  </office:meta>
</office:document-meta>
</file>